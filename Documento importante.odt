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 página: Cliente cadastro</text:span></text:p>
      <text:p text:style-name="P1"><text:span text:style-name="T1">2 página: Entrar como cliente</text:span></text:p>
      <text:p text:style-name="P1"><text:span text:style-name="T1">3 página: cadastro funcionário</text:span></text:p>
      <text:p text:style-name="P1"><text:span text:style-name="T1">4 página: entrar como funcionário</text:span></text:p>
      <text:p text:style-name="P1"><text:span text:style-name="T1"/></text:p>
      <text:p text:style-name="P1"><text:span text:style-name="T1">P1-P2:</text:span></text:p>
      <text:p text:style-name="P1"><text:span text:style-name="T1">Funções:</text:span></text:p>
      <text:list text:style-name="L2">
        <text:list-item>
          <text:p text:style-name="P2"><text:span text:style-name="T1">O cliente deve poder visualizar os horários livres para cadastrar uma consulta;</text:span></text:p>
        </text:list-item>
        <text:list-item>
          <text:p text:style-name="P2"><text:span text:style-name="T1">cadastrar o pet, junto com seus dados;</text:span></text:p>
        </text:list-item>
        <text:list-item>
          <text:p text:style-name="P2"><text:span text:style-name="T1">cancelar consulta;</text:span></text:p>
        </text:list-item>
        <text:list-item>
          <text:p text:style-name="P2"><text:span text:style-name="T1">cadastrar dados do cliente;</text:span></text:p>
        </text:list-item>
        <text:list-item>
          <text:p text:style-name="P2"><text:span text:style-name="T1"/></text:p>
        </text:list-item>
      </text:list>
      <text:p text:style-name="P3"><text:span text:style-name="T1"/></text:p>
      <text:p text:style-name="P3"><text:span text:style-name="T1">P3-P4:</text:span></text:p>
      <text:p text:style-name="P3"><text:span text:style-name="T1">Funções:</text:span></text:p>
      <text:list text:style-name="L4">
        <text:list-item>
          <text:p text:style-name="P4"><text:span text:style-name="T1">Funcionário deve ter acesso a página de clientes cadastrados; </text:span></text:p>
        </text:list-item>
        <text:list-item>
          <text:p text:style-name="P4"><text:span text:style-name="T1">horários da consulta do cliente;</text:span></text:p>
        </text:list-item>
        <text:list-item>
          <text:p text:style-name="P4"><text:span text:style-name="T1">criar, adiar e adiantar consultas;</text:span></text:p>
        </text:list-item>
        <text:list-item>
          <text:p text:style-name="P4"><text:span text:style-name="T1">poderá visualiar os dados do pet e do cliente;</text:span></text:p>
        </text:list-item>
        <text:list-item>
          <text:p text:style-name="P4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